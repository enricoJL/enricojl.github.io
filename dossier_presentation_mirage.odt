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text-properties fo:language="fr" fo:country="CA" fo:font-weight="bold" style:font-weight-asian="bold" style:font-weight-complex="bold"/>
    </style:style>
    <style:style style:name="P2" style:family="paragraph" style:parent-style-name="First_20_paragraph">
      <style:text-properties fo:language="fr" fo:country="CA"/>
    </style:style>
    <style:style style:name="P3" style:family="paragraph" style:parent-style-name="Text_20_body">
      <style:text-properties fo:language="fr" fo:country="CA"/>
    </style:style>
    <style:style style:name="P4" style:family="paragraph" style:parent-style-name="Text_20_body">
      <style:text-properties fo:language="fr" fo:country="CA" officeooo:paragraph-rsid="000cbfaa"/>
    </style:style>
    <style:style style:name="P5" style:family="paragraph" style:parent-style-name="Text_20_body">
      <style:text-properties fo:language="fr" fo:country="CA" fo:font-weight="bold" officeooo:paragraph-rsid="000cbfaa" style:font-weight-asian="bold" style:font-weight-complex="bold"/>
    </style:style>
    <style:style style:name="P6" style:family="paragraph" style:parent-style-name="Text_20_body">
      <style:text-properties fo:language="fr" fo:country="CA" fo:font-weight="normal" officeooo:rsid="000cbfaa" officeooo:paragraph-rsid="000cbfaa" style:font-weight-asian="normal" style:font-weight-complex="normal"/>
    </style:style>
    <style:style style:name="P7" style:family="paragraph" style:parent-style-name="Heading_20_2" style:list-style-name="">
      <style:paragraph-properties fo:break-before="page"/>
    </style:style>
    <style:style style:name="P8" style:family="paragraph" style:parent-style-name="Heading_20_2" style:list-style-name="">
      <style:text-properties fo:language="fr" fo:country="CA"/>
    </style:style>
    <style:style style:name="P9" style:family="paragraph" style:parent-style-name="Quotations">
      <style:paragraph-properties fo:margin-left="1.27cm" fo:margin-right="0cm" fo:text-indent="0cm" style:auto-text-indent="false"/>
      <style:text-properties fo:language="fr" fo:country="CA"/>
    </style:style>
    <style:style style:name="T1" style:family="text">
      <style:text-properties officeooo:rsid="000cbfaa"/>
    </style:style>
    <style:style style:name="T2" style:family="text">
      <style:text-properties style:text-position="super 58%" officeooo:rsid="000cbfaa"/>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a239c"/>
    </style:style>
    <style:style style:name="T6" style:family="text">
      <style:text-properties fo:font-style="italic" style:font-style-asian="italic" style:font-style-complex="italic"/>
    </style:style>
    <style:style style:name="T7" style:family="text">
      <style:text-properties officeooo:rsid="000ae397"/>
    </style:style>
    <style:style style:name="T8" style:family="text">
      <style:text-properties fo:font-weight="bold" officeooo:rsid="000cbfaa" style:font-weight-asian="bold" style:font-weight-complex="bold"/>
    </style:style>
    <style:style style:name="T9" style:family="text">
      <style:text-properties fo:language="fr" fo:country="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oupe Ville-Marie Littérature<text:line-break/><text:span text:style-name="T1">Service des manuscrits (L’Hexagone)<text:line-break/>4545, rue Frontenac (3</text:span><text:span text:style-name="T2">e</text:span><text:span text:style-name="T1"> étage)<text:line-break/>Montréal (Québec) H2H 2R7</text:span></text:p>
      <text:p text:style-name="P1"/>
      <text:p text:style-name="P1"/>
      <text:p text:style-name="P2"><text:span text:style-name="T3">Objet : Soumission de manuscrit – </text:span><text:span text:style-name="T4">Mirage</text:span><text:span text:style-name="T3"> (Poésie)</text:span></text:p>
      <text:p text:style-name="P3"/>
      <text:p text:style-name="P3"/>
      <text:p text:style-name="P3">À l’attention du comité de lecture,</text:p>
      <text:p text:style-name="P3"/>
      <text:p text:style-name="P3">Je vous soumets aujourd’hui le manuscrit de mon recueil intitulé <text:span text:style-name="T3">Mirage</text:span>.</text:p>
      <text:p text:style-name="P3">Ce recueil rassemble <text:span text:style-name="T5">des poèmes choisis sur </text:span>trente-quatre ans de réflexion poétique (1992-2026) autour d’un axe unique : la tension entre l’image perçue et la réalité de l’être. De l’éveil du désir à la métamorphose spirituelle, <text:span text:style-name="T6">Mirage</text:span> trace une trajectoire qui tente de répondre à une question fondamentale : comment rencontrer l’autre au-delà des projections que nous formons de lui ?</text:p>
      <text:p text:style-name="P3">Vous trouverez ci-<text:span text:style-name="T7">dessous</text:span> la note d’intention, une courte biographie <text:span text:style-name="T7">et ci-joint</text:span> le manuscrit complet.</text:p>
      <text:p text:style-name="P3">Je vous remercie de l’attention que vous porterez à mon travail et reste à votre entière disposition pour en discuter.</text:p>
      <text:p text:style-name="P3"/>
      <text:p text:style-name="P4">Cordialement,<text:span text:style-name="T3"/></text:p>
      <text:p text:style-name="P5"/>
      <text:p text:style-name="P4"><text:span text:style-name="T3"><text:line-break/><text:line-break/>Enrico </text:span><text:span text:style-name="T8">J. </text:span><text:span text:style-name="T3">Lévesque</text:span></text:p>
      <text:p text:style-name="P6">900 Place Hélène-Boullé, app. 202<text:line-break/>Boucherville (Québec) J4B 2A7<text:line-break/>514-239-7646</text:p>
      <text:h text:style-name="P7" text:outline-level="2"><text:bookmark-start text:name="présentation-de-lœuvre-le-pitch"/><text:span text:style-name="T9">Présentation de l’œuvre </text:span><text:bookmark-end text:name="présentation-de-lœuvre-le-pitch"/></text:h>
      <text:p text:style-name="P2"><text:span text:style-name="T3">Titre :</text:span> <text:span text:style-name="T6">Mirage</text:span><text:line-break/><text:span text:style-name="T3">Genre :</text:span> Poésie / Essai poétique<text:line-break/><text:span text:style-name="T3">Volume :</text:span> ~45 poèmes et textes en prose (environ 80 pages)</text:p>
      <text:p text:style-name="P3"><text:span text:style-name="T3">Résumé :</text:span><text:line-break/><text:span text:style-name="T6">Mirage</text:span> est une odyssée en trois phases. La première, <text:span text:style-name="T3">Mirage</text:span>, explore la fascination pour l’image de l’autre, cette beauté qui comble mais qui fige. La seconde, <text:span text:style-name="T3">Prison</text:span>, nomme le mécanisme de l’isolement : le “choc des titans” où nos images mentales s’entrechoquent et nous empêchent de nous toucher. Enfin, <text:span text:style-name="T3">Métamorphose</text:span> propose une issue par le don de soi et le dépouillement, là où le “Je suis” n’a plus besoin de reflet.</text:p>
      <text:h text:style-name="P8" text:outline-level="2"/>
      <text:h text:style-name="P8" text:outline-level="2"><text:bookmark-start text:name="note-dintention"/>Note d’intention<text:bookmark-end text:name="note-dintention"/></text:h>
      <text:p text:style-name="P9">« Le vrai monde se trouve au milieu, entre les choses que l’on voit. »</text:p>
      <text:p text:style-name="P2">À l’heure où notre identité est de plus en plus médiée par des écrans et des représentations virtuelles, <text:span text:style-name="T6">Mirage</text:span> interroge la solidité de nos présences. Ce recueil est né d’un besoin de cartographier ce que j’appelle le « troisième univers » : cet espace hétérogène de croyances et de perceptions partagées où nous formons nos connaissances, souvent au détriment de la vérité brute.</text:p>
      <text:p text:style-name="P3">Ma démarche n’est pas seulement esthétique ; elle est ontologique. Influencé par la pensée de Martin Buber sur le rapport « Je-Tu » et par la clarté mélancolique de Saint-Denys-Garneau, je cherche une poésie qui ne se contente pas de décrire, mais qui agit comme un solvant sur nos carapaces.</text:p>
      <text:p text:style-name="P3">Passer de « j’embrassais mon mirage » (1992) à « jusqu’à te ressembler » (2026) marque un passage de la possession à la communion. C’est ce mouvement, cette lente érosion des images au profit du souffle, que je souhaite partager.</text:p>
      <text:h text:style-name="P8" text:outline-level="2"/>
      <text:h text:style-name="P8" text:outline-level="2"><text:bookmark-start text:name="notice-biographique"/>Notice Biographique<text:bookmark-end text:name="notice-biographique"/></text:h>
      <text:p text:style-name="P2"><text:span text:style-name="T3">Enrico J. Lévesque</text:span><text:line-break/>Consultant en technologies de l’information et architecte d’affaires de profession, Enrico J. Lévesque habite l’espace entre la structure et l’essence. Poète de l’ombre depuis plus de trente ans, il construit son œuvre comme on dessine les plans d’une cathédrale : avec une attention méticuleuse aux fondations et une quête constante de lumière. <text:span text:style-name="T6">Mirage</text:span> est son premier recueil structuré, fruit d’une longue maturation où la rigueur du système rencontre la vulnérabilité du <text:soft-page-break/>v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CA"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fr" fo:country="CA"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1">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fr" fo:country="CA"/>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MacOSX_AARCH64 LibreOffice_project/70e089b17412e4cb7773e41413306b17a2328c34</meta:generator>
    <dc:title/>
    <dc:description/>
    <dc:subject/>
    <meta:keyword/>
    <meta:initial-creator/>
    <meta:creation-date>2026-06-11T00:12:33Z</meta:creation-date>
    <dc:date>2026-06-10T20:51:54.431912000</dc:date>
    <meta:editing-duration>PT20M59S</meta:editing-duration>
    <meta:editing-cycles>2</meta:editing-cycles>
    <meta:document-statistic meta:table-count="0" meta:image-count="0" meta:object-count="0" meta:page-count="3" meta:paragraph-count="21" meta:word-count="493" meta:character-count="3058" meta:non-whitespace-character-count="2581"/>
  </office:meta>
</office:document-meta>
</file>