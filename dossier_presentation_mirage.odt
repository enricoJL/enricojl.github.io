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irst_20_paragraph">
      <style:text-properties fo:language="fr" fo:country="CA"/>
    </style:style>
    <style:style style:name="P2" style:family="paragraph" style:parent-style-name="First_20_paragraph">
      <style:text-properties fo:language="fr" fo:country="CA" fo:font-weight="bold" style:font-weight-asian="bold" style:font-weight-complex="bold"/>
    </style:style>
    <style:style style:name="P3" style:family="paragraph" style:parent-style-name="Text_20_body">
      <style:text-properties fo:language="fr" fo:country="CA"/>
    </style:style>
    <style:style style:name="P4" style:family="paragraph" style:parent-style-name="Heading_20_2">
      <style:paragraph-properties fo:break-before="page"/>
      <style:text-properties fo:language="fr" fo:country="CA"/>
    </style:style>
    <style:style style:name="P5" style:family="paragraph" style:parent-style-name="Heading_20_2">
      <style:text-properties fo:language="fr" fo:country="CA"/>
    </style:style>
    <style:style style:name="T1" style:family="text">
      <style:text-properties fo:font-style="italic" officeooo:rsid="0025a036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5fc73"/>
    </style:style>
    <style:style style:name="T4" style:family="text">
      <style:text-properties officeooo:rsid="0025a036"/>
    </style:style>
    <style:style style:name="T5" style:family="text">
      <style:text-properties officeooo:rsid="00296a3c"/>
    </style:style>
    <style:style style:name="T6" style:family="text">
      <style:text-properties officeooo:rsid="00140752"/>
    </style:style>
    <style:style style:name="T7" style:family="text">
      <style:text-properties fo:font-style="italic" officeooo:rsid="00265c1d" style:font-style-asian="italic" style:font-style-complex="italic"/>
    </style:style>
    <style:style style:name="T8" style:family="text">
      <style:text-properties fo:font-style="italic" officeooo:rsid="001f3ea4" style:font-style-asian="italic" style:font-style-complex="italic"/>
    </style:style>
    <style:style style:name="T9" style:family="text">
      <style:text-properties officeooo:rsid="00296446"/>
    </style:style>
    <style:style style:name="T10" style:family="text">
      <style:text-properties officeooo:rsid="002246ce"/>
    </style:style>
    <style:style style:name="T11" style:family="text">
      <style:text-properties officeooo:rsid="00283db7"/>
    </style:style>
    <style:style style:name="T12" style:family="text">
      <style:text-properties fo:font-style="italic" officeooo:rsid="0019e142" style:font-style-asian="italic" style:font-style-complex="italic"/>
    </style:style>
    <style:style style:name="T13" style:family="text">
      <style:text-properties fo:font-style="italic" officeooo:rsid="0023be84" style:font-style-asian="italic" style:font-style-complex="italic"/>
    </style:style>
    <style:style style:name="T14" style:family="text">
      <style:text-properties officeooo:rsid="00265c1d"/>
    </style:style>
    <style:style style:name="T15" style:family="text">
      <style:text-properties fo:language="fr" fo:country="CA"/>
    </style:style>
    <style:style style:name="T16" style:family="text">
      <style:text-properties fo:language="fr" fo:country="CA" officeooo:rsid="001ad606"/>
    </style:style>
    <style:style style:name="T17" style:family="text">
      <style:text-properties fo:language="fr" fo:country="CA" officeooo:rsid="001f3ea4"/>
    </style:style>
    <style:style style:name="T18" style:family="text">
      <style:text-properties fo:language="fr" fo:country="CA" officeooo:rsid="001c2958"/>
    </style:style>
    <style:style style:name="T19" style:family="text">
      <style:text-properties officeooo:rsid="00257d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Groupe Ville-Marie Littérature<text:line-break/>Service des manuscrits (L’Hexagone)<text:line-break/>4545, rue Frontenac (3e étage)<text:line-break/>Montréal (Québec) H2H 2R7</text:p>
      <text:p text:style-name="P1"/>
      <text:p text:style-name="P2">Objet : Soumission de manuscrit – <text:span text:style-name="T1">e</text:span><text:span text:style-name="T2">ntre l’image et la mer</text:span> (<text:span text:style-name="T3">p</text:span>oésie)</text:p>
      <text:p text:style-name="Text_20_body"/>
      <text:p text:style-name="Standard">À l’attention du comité de lecture,</text:p>
      <text:p text:style-name="Standard"/>
      <text:p text:style-name="Standard">Je vous soumets aujourd’hui mon manuscrit intitulé <text:span text:style-name="T4">e</text:span><text:span text:style-name="T2">ntre l'image et la mer.</text:span></text:p>
      <text:p text:style-name="Standard"/>
      <text:p text:style-name="Standard">Ce recueil est le fruit d’une maturation de plus de trente ans. Il rassemble une sélection de quarante-<text:span text:style-name="T5">quatre</text:span> poèmes et textes en prose, choisis parmi une œuvre plus vaste entamée en 1992. Ce corpus trace le sillage d'une lente érosion : celle du mirage initial où l'on embrasse l'image de l'autre plutôt que l'autre lui-même, jusqu'à une transparence où l'être se redéfinit hors de l'économie des reflets.</text:p>
      <text:p text:style-name="Standard"/>
      <text:p text:style-name="Standard">Mon parcours professionnel d’architecte <text:span text:style-name="T6">en informatique</text:span> m’amène quotidiennement à cartographier des structures, à définir des modèles et à assurer la cohérence de flux complexes. Ma poésie est l’envers indispensable de ce décor : elle explore précisément ce qui échappe à la structure, la fragilité des masques sociaux et la « friction des choses » là où le système s'efface devant la vulnérabilité de l'humain.</text:p>
      <text:p text:style-name="Standard"/>
      <text:p text:style-name="Standard">Travailler l'architecture d'un recueil comme on conçoit un système m'a permis de structurer cette sélection non comme une simple chronologie, mais comme une trajectoire philosophique en trois mouvements : le Mirage (l'illusion), la Prison (le choc des images) et la Transparence (la présence nue).</text:p>
      <text:p text:style-name="Standard"/>
      <text:p text:style-name="Standard">Poète de l’ombre depuis 1992, je cherche dans ce recueil à établir un pont entre la précision du vers et la structure de l'être, au-delà des représentations que nous érigeons entre nous.</text:p>
      <text:p text:style-name="Standard"/>
      <text:p text:style-name="Standard">Je vous remercie de l’attention que vous porterez à ce projet et je demeure à votre entière disposition pour tout échange complémentaire.</text:p>
      <text:p text:style-name="Standard"/>
      <text:p text:style-name="Standard">Cordialement,</text:p>
      <text:p text:style-name="P3"><text:line-break/>Enrico Lévesque</text:p>
      <text:p text:style-name="P3">900 Place Hélène-Boullé, app. 202<text:line-break/>Boucherville (Québec) J4B 2A7<text:line-break/>514-239-7646</text:p>
      <text:h text:style-name="P4" text:outline-level="2" text:is-list-header="true"><text:bookmark-start text:name="présentation-de-lœuvre-le-pitch"/>Présentation de l’œuvre <text:bookmark-end text:name="présentation-de-lœuvre-le-pitch"/></text:h>
      <text:p text:style-name="P1">Titre : <text:span text:style-name="T7">e</text:span><text:span text:style-name="T8">ntre l’image et la mer</text:span><text:line-break/>Genre : Poésie<text:line-break/>Volume : <text:span text:style-name="T9">44</text:span> poèmes et textes en prose (<text:span text:style-name="T10">~8</text:span><text:span text:style-name="T11">4</text:span> pages)</text:p>
      <text:p text:style-name="P3">Résumé :<text:line-break/><text:span text:style-name="T12">Entre l’image et la mer</text:span> est une odyssée en trois phases. La première, <text:span text:style-name="T2">Mirage</text:span>, explore la fascination pour l’image de l’autre, cette beauté qui comble mais qui fige. La seconde, <text:span text:style-name="T2">Prison</text:span>, nomme le mécanisme de l’isolement : le « choc des titans » où nos images mentales s’entrechoquent et nous empêchent de nous toucher. Enfin, <text:span text:style-name="T13">Transparence</text:span> propose une issue par le don de soi et le dépouillement, là où le « Je suis » n’a plus besoin de reflet.</text:p>
      <text:h text:style-name="P5" text:outline-level="2" text:is-list-header="true"><text:bookmark-start text:name="note-dintention"/>Note d’intention<text:bookmark-end text:name="note-dintention"/></text:h>
      <text:p text:style-name="P1">À l’heure où notre identité est de plus en plus médiée par des écrans et des représentations virtuelles, <text:span text:style-name="T14">e</text:span><text:span text:style-name="T8">ntre l’image et la mer</text:span> interroge la solidité de nos présences. Ce recueil est né d’un besoin de cartographier ce que j’appelle le « troisième univers » : cet espace hétérogène de croyances et de perceptions partagées où nous formons nos connaissances, souvent au détriment de la vérité brute.</text:p>
      <text:p text:style-name="P3">Ma démarche n’est pas seulement esthétique ; elle est ontologique. Influencé par la pensée de Martin Buber sur le rapport « Je-Tu » et par la clarté mélancolique de Saint-Denys-Garneau, je cherche une poésie qui ne se contente pas de décrire, mais qui agit comme un solvant sur nos carapaces.</text:p>
      <text:p text:style-name="P3">Passer de « j’embrassais mon mirage » (1992) à « jusqu’à te ressembler » (2026) marque un passage de la possession à la communion. C’est ce mouvement, cette lente érosion des images au profit du souffle, que je souhaite partager.</text:p>
      <text:h text:style-name="P5" text:outline-level="2" text:is-list-header="true"><text:bookmark-start text:name="notice-biographique"/>Notice biographique<text:bookmark-end text:name="notice-biographique"/></text:h>
      <text:p text:style-name="Text_20_body"><text:span text:style-name="T15">Enrico J. Lévesque<text:line-break/></text:span><text:span text:style-name="T16">Architecte</text:span><text:span text:style-name="T17"> </text:span><text:span text:style-name="T18">informatique</text:span><text:span text:style-name="T15"> </text:span>de profession, Enrico J. Lévesque habite l'espace entre la structure et l'essence. Poète de l'ombre depuis plus de trente ans, il construit son œuvre comme on dessine les plans d'une cathédrale : avec une attention méticuleuse aux fondations et une quête constante de lumière. <text:span text:style-name="Emphasis"><text:span text:style-name="T19">Entre l’image et la mer</text:span></text:span> est son premier recueil structuré, fruit d'une longue maturation où la rigueur du système rencontre la vulnérabilité du ver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CA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CA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20_Text" style:display-name="Source Text" style:family="text">
      <style:text-properties style:font-name="Courier New" fo:font-family="'Courier New'" style:font-family-generic="modern" style:font-pitch="fixed" fo:language="zxx" fo:country="non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1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fr" fo:country="CA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MacOSX_AARCH64 LibreOffice_project/70e089b17412e4cb7773e41413306b17a2328c34</meta:generator>
    <dc:title/>
    <dc:description/>
    <dc:subject/>
    <meta:keyword/>
    <meta:initial-creator/>
    <meta:creation-date>2026-06-11T00:12:33Z</meta:creation-date>
    <dc:date>2026-06-13T19:26:56.917804000</dc:date>
    <meta:editing-duration>PT3H5M28S</meta:editing-duration>
    <meta:editing-cycles>24</meta:editing-cycles>
    <meta:document-statistic meta:table-count="0" meta:image-count="0" meta:object-count="0" meta:page-count="2" meta:paragraph-count="22" meta:word-count="626" meta:character-count="3837" meta:non-whitespace-character-count="3229"/>
  </office:meta>
</office:document-meta>
</file>