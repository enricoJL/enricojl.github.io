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text-properties fo:language="fr" fo:country="CA" fo:font-weight="bold" style:font-weight-asian="bold" style:font-weight-complex="bold"/>
    </style:style>
    <style:style style:name="P2" style:family="paragraph" style:parent-style-name="First_20_paragraph">
      <style:text-properties fo:language="fr" fo:country="CA"/>
    </style:style>
    <style:style style:name="P3" style:family="paragraph" style:parent-style-name="Text_20_body">
      <style:text-properties fo:language="fr" fo:country="CA"/>
    </style:style>
    <style:style style:name="P4" style:family="paragraph" style:parent-style-name="Text_20_body">
      <style:text-properties fo:language="fr" fo:country="CA" officeooo:paragraph-rsid="000cbfaa"/>
    </style:style>
    <style:style style:name="P5" style:family="paragraph" style:parent-style-name="Text_20_body">
      <style:text-properties fo:language="fr" fo:country="CA" fo:font-weight="bold" officeooo:paragraph-rsid="000cbfaa" style:font-weight-asian="bold" style:font-weight-complex="bold"/>
    </style:style>
    <style:style style:name="P6" style:family="paragraph" style:parent-style-name="Text_20_body">
      <style:text-properties fo:language="fr" fo:country="CA" fo:font-weight="normal" officeooo:rsid="000cbfaa" officeooo:paragraph-rsid="000cbfaa" style:font-weight-asian="normal" style:font-weight-complex="normal"/>
    </style:style>
    <style:style style:name="P7" style:family="paragraph" style:parent-style-name="Heading_20_2" style:list-style-name="">
      <style:paragraph-properties fo:break-before="page"/>
    </style:style>
    <style:style style:name="P8" style:family="paragraph" style:parent-style-name="Heading_20_2" style:list-style-name="">
      <style:text-properties fo:language="fr" fo:country="CA"/>
    </style:style>
    <style:style style:name="T1" style:family="text">
      <style:text-properties officeooo:rsid="000cbfaa"/>
    </style:style>
    <style:style style:name="T2" style:family="text">
      <style:text-properties style:text-position="super 58%" officeooo:rsid="000cbf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a239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f552f"/>
    </style:style>
    <style:style style:name="T8" style:family="text">
      <style:text-properties officeooo:rsid="000ae397"/>
    </style:style>
    <style:style style:name="T9" style:family="text">
      <style:text-properties fo:font-weight="bold" officeooo:rsid="000cbfaa" style:font-weight-asian="bold" style:font-weight-complex="bold"/>
    </style:style>
    <style:style style:name="T10" style:family="text">
      <style:text-properties fo:language="fr" fo:country="CA"/>
    </style:style>
    <style:style style:name="T11" style:family="text">
      <style:text-properties fo:language="fr" fo:country="CA" fo:font-weight="bold" style:font-weight-asian="bold" style:font-weight-complex="bold"/>
    </style:style>
    <style:style style:name="T12" style:family="text">
      <style:text-properties fo:language="fr" fo:country="CA" officeooo:rsid="000f5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oupe Ville-Marie Littérature<text:line-break/><text:span text:style-name="T1">Service des manuscrits (L’Hexagone)<text:line-break/>4545, rue Frontenac (3</text:span><text:span text:style-name="T2">e</text:span><text:span text:style-name="T1"> étage)<text:line-break/>Montréal (Québec) H2H 2R7</text:span></text:p>
      <text:p text:style-name="P1"/>
      <text:p text:style-name="P1"/>
      <text:p text:style-name="P2"><text:span text:style-name="T3">Objet : Soumission de manuscrit – </text:span><text:span text:style-name="T4">Mirage</text:span><text:span text:style-name="T3"> (Poésie)</text:span></text:p>
      <text:p text:style-name="P3"/>
      <text:p text:style-name="P3"/>
      <text:p text:style-name="P3">À l’attention du comité de lecture,</text:p>
      <text:p text:style-name="P3"/>
      <text:p text:style-name="P3">Je vous soumets aujourd’hui le manuscrit de mon recueil intitulé <text:span text:style-name="T3">Mirage</text:span>.</text:p>
      <text:p text:style-name="P3">Ce recueil rassemble <text:span text:style-name="T5">des poèmes choisis sur </text:span>trente-quatre ans de réflexion poétique (1992-2026) autour d’un axe unique : la tension entre l’image perçue et la réalité de l’être. De l’éveil du désir à la métamorphose spirituelle, <text:span text:style-name="T6">Mirage</text:span> trace une trajectoire qui tente de répondre à une question fondamentale : comment rencontrer l’autre au-delà des projections que nous formons de lui ?</text:p>
      <text:p text:style-name="P3">Vous trouverez <text:span text:style-name="T7">dans les pages suivantes</text:span> la note d’intention, une courte biographie <text:span text:style-name="T8">et</text:span> le manuscrit complet.</text:p>
      <text:p text:style-name="P3">Je vous remercie de l’attention que vous porterez à mon travail et reste à votre entière disposition pour en discuter.</text:p>
      <text:p text:style-name="P3"/>
      <text:p text:style-name="P4">Cordialement,<text:span text:style-name="T3"/></text:p>
      <text:p text:style-name="P5"/>
      <text:p text:style-name="P4"><text:span text:style-name="T3"><text:line-break/><text:line-break/>Enrico </text:span><text:span text:style-name="T9">J. </text:span><text:span text:style-name="T3">Lévesque</text:span></text:p>
      <text:p text:style-name="P6">900 Place Hélène-Boullé, app. 202<text:line-break/>Boucherville (Québec) J4B 2A7<text:line-break/>514-239-7646</text:p>
      <text:h text:style-name="P7" text:outline-level="2"><text:bookmark-start text:name="présentation-de-lœuvre-le-pitch"/><text:span text:style-name="T10">Présentation de l’œuvre </text:span><text:bookmark-end text:name="présentation-de-lœuvre-le-pitch"/></text:h>
      <text:p text:style-name="P2"><text:span text:style-name="T3">Titre :</text:span> <text:span text:style-name="T6">Mirage</text:span><text:line-break/><text:span text:style-name="T3">Genre :</text:span> Poésie<text:line-break/><text:span text:style-name="T3">Volume :</text:span> ~45 poèmes et textes en prose (environ 80 pages)</text:p>
      <text:p text:style-name="P3"><text:span text:style-name="T3">Résumé :</text:span><text:line-break/><text:span text:style-name="T6">Mirage</text:span> est une odyssée en trois phases. La première, <text:span text:style-name="T3">Mirage</text:span>, explore la fascination pour l’image de l’autre, cette beauté qui comble mais qui fige. La seconde, <text:span text:style-name="T3">Prison</text:span>, nomme le mécanisme de l’isolement : le « choc des titans » où nos images mentales s’entrechoquent et nous empêchent de nous toucher. Enfin, <text:span text:style-name="T3">Métamorphose</text:span> propose une issue par le don de soi et le dépouillement, là où le « Je suis » n’a plus besoin de reflet.</text:p>
      <text:h text:style-name="P8" text:outline-level="2"><text:bookmark-start text:name="note-dintention"/>Note d’intention<text:bookmark-end text:name="note-dintention"/></text:h>
      <text:p text:style-name="P2">À l’heure où notre identité est de plus en plus médiée par des écrans et des représentations virtuelles, <text:span text:style-name="T6">Mirage</text:span> interroge la solidité de nos présences. Ce recueil est né d’un besoin de cartographier ce que j’appelle le « troisième univers » : cet espace hétérogène de croyances et de perceptions partagées où nous formons nos connaissances, souvent au détriment de la vérité brute.</text:p>
      <text:p text:style-name="P3">Ma démarche n’est pas seulement esthétique ; elle est ontologique. Influencé par la pensée de Martin Buber sur le rapport « Je-Tu » et par la clarté mélancolique de Saint-Denys-Garneau, je cherche une poésie qui ne se contente pas de décrire, mais qui agit comme un solvant sur nos carapaces.</text:p>
      <text:p text:style-name="P3">Passer de « j’embrassais mon mirage » (1992) à « jusqu’à te ressembler » (2026) marque un passage de la possession à la communion. C’est ce mouvement, cette lente érosion des images au profit du souffle, que je souhaite partager.</text:p>
      <text:h text:style-name="P8" text:outline-level="2"><text:bookmark-start text:name="notice-biographique"/>Notice <text:span text:style-name="T7">b</text:span>iographique<text:bookmark-end text:name="notice-biographique"/></text:h>
      <text:p text:style-name="Text_20_body"><text:span text:style-name="T11">Enrico J. Lévesque</text:span><text:span text:style-name="T10"><text:line-break/></text:span><text:span text:style-name="T12">Informaticien </text:span>de profession, Enrico J. Lévesque habite l'espace entre la structure et l'essence. Poète de l'ombre depuis plus de trente ans, il construit son œuvre comme on dessine les plans d'une cathédrale : avec une attention méticuleuse aux fondations et une quête constante de lumière. <text:span text:style-name="Emphasis">Mirage</text:span> est son premier recueil structuré, fruit d'une longue maturation où la rigueur du système rencontre la vulnérabilité du v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20_Text" style:display-name="Source Text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1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CA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dc:title/>
    <dc:description/>
    <dc:subject/>
    <meta:keyword/>
    <meta:initial-creator/>
    <meta:creation-date>2026-06-11T00:12:33Z</meta:creation-date>
    <dc:date>2026-06-10T21:54:54.499485000</dc:date>
    <meta:editing-duration>PT1H12M45S</meta:editing-duration>
    <meta:editing-cycles>4</meta:editing-cycles>
    <meta:document-statistic meta:table-count="0" meta:image-count="0" meta:object-count="0" meta:page-count="2" meta:paragraph-count="20" meta:word-count="474" meta:character-count="2925" meta:non-whitespace-character-count="2466"/>
  </office:meta>
</office:document-meta>
</file>